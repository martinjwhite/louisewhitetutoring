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T1"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ouise Reade White Tutoring</text:span> </text:p>
      <text:p text:style-name="P1"><text:span text:style-name="T1">Making sense of letters and numbers</text:span> </text:p>
      <text:p text:style-name="P1"><text:span text:style-name="T1">With over 30 years of experience as a primary teacher, I bring a deep passion for helping children develop confidence and success in reading, writing, and maths. </text:span> </text:p>
      <text:p text:style-name="P1"><text:span text:style-name="T1">My 30 years of teaching in primary schools has taught me that for some children our curriculum moves too quickly. The nature of the classroom and the curriculum,  demands that children move onto the next concept before they have fully grasped the current. This can impact a child’s confidence. I can help identify gaps in a child’s knowledge and develop bespoke learning programs to fill those gaps and help improve a child’s confidence.</text:span> </text:p>
      <text:p text:style-name="P1"><text:span text:style-name="T1">I specialise in phonics teaching across EYFS and KS1, with extensive experience supporting children to close learning gaps and successfully pass the Year 1 Phonics Screening Check. I also offer tailored support in early maths and KS2 learning, adapting every session to meet each child’s individual needs.</text:span> </text:p>
      <text:p text:style-name="P1"><text:span text:style-name="T1">Working within an accredited nurture school, I have a strong background in supporting children with additional needs and EHCPs in a calm, trauma-informed and nurturing way. I have experience working with children with specific learning difficulties, sensory needs, anxiety, social and communication differences, as well as dyslexia, ADHD and ASD. My approach is gentle, supportive and personalised, with sessions that include brain breaks and confidence-building activities to help every child feel safe, motivated and ready to learn.</text:span> </text:p>
      <text:p text:style-name="P1"><text:span text:style-name="T1">I can offer daytime, evening and weekend sessions and can be available during school holidays too.</text:span> </text:p>
      <text:p text:style-name="P1"><text:span text:style-name="T1">Pay-As-You-Go Rates</text:span> </text:p>
      <text:p text:style-name="P1"><text:span text:style-name="T1">Payment is kindly requested up front and via bank transfer</text:span> </text:p>
      <text:p text:style-name="P1"><text:span text:style-name="T1">Standard Hourly Rate: £35/hour  (at my home)</text:span> </text:p>
      <text:p text:style-name="P1"><text:span text:style-name="T1">Traveling Hourly Rate: £40</text:span> </text:p>
      <text:p text:style-name="P1"><text:span text:style-name="T1">Block Booking Rates Book sets of 6 lessons.</text:span> </text:p>
      <text:p text:style-name="P1"><text:span text:style-name="T1">Standard Hourly Rate: £30/hour  (at my home)</text:span> </text:p>
      <text:p text:style-name="P1"><text:span text:style-name="T1">Traveling Hourly Rate: £35</text:span> </text:p>
      <text:p text:style-name="P1"><text:span text:style-name="T1">Cancelation Policy</text:span> </text:p>
      <text:p text:style-name="P1">   <text:span text:style-name="T1">Please give 24 hours’ notice and there will be no charge </text:span> </text:p>
      <text:p text:style-name="P1">  <text:span text:style-name="T1">Less than 24 hours → full session fee charged </text:span> </text:p>
      <text:p text:style-name="P1">  <text:span text:style-name="T1">In instances of illness or emergencies as long as the session can be rearranged there will be no charge.</text:span> </text:p>
      <text:p text:style-name="P1"> </text:p>
      <text:p text:style-name="P1"> </text:p>
      <text:p text:style-name="P1"> </text:p>
      <text:p text:style-name="P1"> </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7T09:14:12.801137200</meta:creation-date>
    <dc:date>2026-04-27T09:14:37.685244600</dc:date>
    <meta:editing-duration>PT25S</meta:editing-duration>
    <meta:editing-cycles>1</meta:editing-cycles>
    <meta:document-statistic meta:table-count="0" meta:image-count="0" meta:object-count="0" meta:page-count="2" meta:paragraph-count="22" meta:word-count="336" meta:character-count="2115" meta:non-whitespace-character-count="1765"/>
    <meta:generator>LibreOffice/26.2.1.2$Windows_X86_64 LibreOffice_project/620$Build-2</meta:generator>
  </office:meta>
</office:document-meta>
</file>